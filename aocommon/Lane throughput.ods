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0.2cm" svg:height="0.47cm" svg:x="4.515cm" svg:y="0c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uffer size</text:p>
          </table:table-cell>
          <table:table-cell table:style-name="Default" office:value-type="string" calcext:value-type="string">
            <text:p>Throughput</text:p>
          </table:table-cell>
          <table:table-cell office:value-type="string" calcext:value-type="string">
            <text:p>Buffer size</text:p>
          </table:table-cell>
          <table:table-cell office:value-type="string" calcext:value-type="string">
            <text:p>Throughpu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985028" calcext:value-type="float">
            <text:p>985028</text:p>
          </table:table-cell>
          <table:table-cell table:formula="of:=LOG([.A2];2)" office:value-type="float" office:value="0" calcext:value-type="float">
            <text:p>0</text:p>
          </table:table-cell>
          <table:table-cell table:formula="of:=LOG([.B2];10)" office:value-type="float" office:value="5.99344857574904" calcext:value-type="float">
            <text:p>5.99344857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94680" calcext:value-type="float">
            <text:p>2.09E+006</text:p>
          </table:table-cell>
          <table:table-cell table:formula="of:=LOG([.A3];2)" office:value-type="float" office:value="1" calcext:value-type="float">
            <text:p>1</text:p>
          </table:table-cell>
          <table:table-cell table:formula="of:=LOG([.B3];10)" office:value-type="float" office:value="6.32111768608557" calcext:value-type="float">
            <text:p>6.32111768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22970" calcext:value-type="float">
            <text:p>4.22E+006</text:p>
          </table:table-cell>
          <table:table-cell table:formula="of:=LOG([.A4];2)" office:value-type="float" office:value="2" calcext:value-type="float">
            <text:p>2</text:p>
          </table:table-cell>
          <table:table-cell table:formula="of:=LOG([.B4];10)" office:value-type="float" office:value="6.62561799620569" calcext:value-type="float">
            <text:p>6.62561799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121500" calcext:value-type="float">
            <text:p>1.01E+007</text:p>
          </table:table-cell>
          <table:table-cell table:formula="of:=LOG([.A5];2)" office:value-type="float" office:value="3" calcext:value-type="float">
            <text:p>3</text:p>
          </table:table-cell>
          <table:table-cell table:formula="of:=LOG([.B5];10)" office:value-type="float" office:value="7.00524487944537" calcext:value-type="float">
            <text:p>7.00524487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321400" calcext:value-type="float">
            <text:p>2.23E+007</text:p>
          </table:table-cell>
          <table:table-cell table:formula="of:=LOG([.A6];2)" office:value-type="float" office:value="4" calcext:value-type="float">
            <text:p>4</text:p>
          </table:table-cell>
          <table:table-cell table:formula="of:=LOG([.B6];10)" office:value-type="float" office:value="7.34872143010456" calcext:value-type="float">
            <text:p>7.34872143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878800" calcext:value-type="float">
            <text:p>3.79E+007</text:p>
          </table:table-cell>
          <table:table-cell table:formula="of:=LOG([.A7];2)" office:value-type="float" office:value="5" calcext:value-type="float">
            <text:p>5</text:p>
          </table:table-cell>
          <table:table-cell table:formula="of:=LOG([.B7];10)" office:value-type="float" office:value="7.57839621210438" calcext:value-type="float">
            <text:p>7.578396212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5555600" calcext:value-type="float">
            <text:p>5.56E+007</text:p>
          </table:table-cell>
          <table:table-cell table:formula="of:=LOG([.A8];2)" office:value-type="float" office:value="6" calcext:value-type="float">
            <text:p>6</text:p>
          </table:table-cell>
          <table:table-cell table:formula="of:=LOG([.B8];10)" office:value-type="float" office:value="7.74472784233214" calcext:value-type="float">
            <text:p>7.744727842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9523800" calcext:value-type="float">
            <text:p>5.95E+007</text:p>
          </table:table-cell>
          <table:table-cell table:formula="of:=LOG([.A9];2)" office:value-type="float" office:value="7" calcext:value-type="float">
            <text:p>7</text:p>
          </table:table-cell>
          <table:table-cell table:formula="of:=LOG([.B9];10)" office:value-type="float" office:value="7.77469064878701" calcext:value-type="float">
            <text:p>7.774690648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9019600" calcext:value-type="float">
            <text:p>4.90E+007</text:p>
          </table:table-cell>
          <table:table-cell table:formula="of:=LOG([.A10];2)" office:value-type="float" office:value="8" calcext:value-type="float">
            <text:p>8</text:p>
          </table:table-cell>
          <table:table-cell table:formula="of:=LOG([.B10];10)" office:value-type="float" office:value="7.69036976308698" calcext:value-type="float">
            <text:p>7.690369763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631600" calcext:value-type="float">
            <text:p>5.26E+007</text:p>
          </table:table-cell>
          <table:table-cell table:formula="of:=LOG([.A11];2)" office:value-type="float" office:value="9" calcext:value-type="float">
            <text:p>9</text:p>
          </table:table-cell>
          <table:table-cell table:formula="of:=LOG([.B11];10)" office:value-type="float" office:value="7.72124657276493" calcext:value-type="float">
            <text:p>7.721246572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1546400" calcext:value-type="float">
            <text:p>5.15E+007</text:p>
          </table:table-cell>
          <table:table-cell table:formula="of:=LOG([.A12];2)" office:value-type="float" office:value="10" calcext:value-type="float">
            <text:p>10</text:p>
          </table:table-cell>
          <table:table-cell table:formula="of:=LOG([.B12];10)" office:value-type="float" office:value="7.71219833955689" calcext:value-type="float">
            <text:p>7.712198339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4482800" calcext:value-type="float">
            <text:p>3.45E+007</text:p>
          </table:table-cell>
          <table:table-cell table:formula="of:=LOG([.A13];2)" office:value-type="float" office:value="11" calcext:value-type="float">
            <text:p>11</text:p>
          </table:table-cell>
          <table:table-cell table:formula="of:=LOG([.B13];10)" office:value-type="float" office:value="7.53760252325411" calcext:value-type="float">
            <text:p>7.5376025233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7878800" calcext:value-type="float">
            <text:p>3.79E+007</text:p>
          </table:table-cell>
          <table:table-cell table:formula="of:=LOG([.A14];2)" office:value-type="float" office:value="12" calcext:value-type="float">
            <text:p>12</text:p>
          </table:table-cell>
          <table:table-cell table:formula="of:=LOG([.B14];10)" office:value-type="float" office:value="7.57839621210438" calcext:value-type="float">
            <text:p>7.578396212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45454500" calcext:value-type="float">
            <text:p>4.55E+007</text:p>
          </table:table-cell>
          <table:table-cell table:formula="of:=LOG([.A15];2)" office:value-type="float" office:value="13" calcext:value-type="float">
            <text:p>13</text:p>
          </table:table-cell>
          <table:table-cell table:formula="of:=LOG([.B15];10)" office:value-type="float" office:value="7.65757688488309" calcext:value-type="float">
            <text:p>7.657576884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44642900" calcext:value-type="float">
            <text:p>4.46E+007</text:p>
          </table:table-cell>
          <table:table-cell table:formula="of:=LOG([.A16];2)" office:value-type="float" office:value="14" calcext:value-type="float">
            <text:p>14</text:p>
          </table:table-cell>
          <table:table-cell table:formula="of:=LOG([.B16];10)" office:value-type="float" office:value="7.64975239858834" calcext:value-type="float">
            <text:p>7.6497523986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42735000" calcext:value-type="float">
            <text:p>4.27E+007</text:p>
          </table:table-cell>
          <table:table-cell table:formula="of:=LOG([.A17];2)" office:value-type="float" office:value="15" calcext:value-type="float">
            <text:p>15</text:p>
          </table:table-cell>
          <table:table-cell table:formula="of:=LOG([.B17];10)" office:value-type="float" office:value="7.63078370829516" calcext:value-type="float">
            <text:p>7.6307837083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39062500" calcext:value-type="float">
            <text:p>3.91E+007</text:p>
          </table:table-cell>
          <table:table-cell table:formula="of:=LOG([.A18];2)" office:value-type="float" office:value="16" calcext:value-type="float">
            <text:p>16</text:p>
          </table:table-cell>
          <table:table-cell table:formula="of:=LOG([.B18];10)" office:value-type="float" office:value="7.59176003468815" calcext:value-type="float">
            <text:p>7.5917600347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</table:table>
      <table:table table:name="Sheet2" table:style-name="ta1">
        <table:shapes>
          <draw:frame draw:z-index="0" draw:style-name="gr2" draw:text-style-name="P1" svg:width="16.305cm" svg:height="12.483cm" svg:x="0.001cm" svg:y="0.001cm">
            <draw:object draw:notify-on-update-of-ranges="Sheet1.C2:Sheet1.C18 Sheet1.D1:Sheet1.D1 Sheet1.D2:Sheet1.D1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2" table:number-rows-repeated="20">
          <table:table-cell/>
        </table:table-row>
        <table:table-row table:style-name="ro1">
          <table:table-cell/>
        </table:table-row>
        <table:table-row table:style-name="ro2" table:number-rows-repeated="2">
          <table:table-cell/>
        </table:table-row>
        <table:table-row table:style-name="ro1">
          <table:table-cell/>
        </table:table-row>
        <table:table-row table:style-name="ro2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14.801cm" style:num-format="1" style:print-orientation="landscape" fo:margin-top="0cm" fo:margin-bottom="0cm" fo:margin-left="0cm" fo:margin-right="0cm" style:scale-to="12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1">00/00/0000</text:date>, <text:time style:data-style-name="N2" text:time-value="0000-00-00T00:00:01.1056132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5T11:43:05.431033293</meta:creation-date>
    <dc:date>2013-10-25T21:25:23.595053411</dc:date>
    <meta:editing-duration>P0D</meta:editing-duration>
    <meta:editing-cycles>2</meta:editing-cycles>
    <meta:generator>LibreOffice/4.1.3.2$Linux_X86_64 LibreOffice_project/410m0$Build-2</meta:generator>
    <meta:document-statistic meta:table-count="2" meta:cell-count="72" meta:object-count="2"/>
  </office:meta>
</office:document-meta>
</file>

<file path=Object 1/content.xml><?xml version="1.0" encoding="utf-8"?>
<math xmlns="http://www.w3.org/1998/Math/MathML">
  <mrow/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5.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306cm" svg:height="12.484cm" xlink:href=".." xlink:type="simple" chart:class="chart:scatter" chart:style-name="ch1">
        <chart:title svg:x="2.566cm" svg:y="0.385cm" chart:style-name="ch2">
          <text:p>Throughput as function of buffer size (double logarithmic)</text:p>
        </chart:title>
        <chart:plot-area chart:style-name="ch3" table:cell-range-address="Sheet1.C2:Sheet1.D18 Sheet1.D1:Sheet1.D1" chart:data-source-has-labels="row" svg:x="1.337cm" svg:y="1.911cm" svg:width="14.317cm" svg:height="9.343cm">
          <chartooo:coordinate-region svg:x="2.064cm" svg:y="2.11cm" svg:width="13.403cm" svg:height="8.497cm"/>
          <chart:axis chart:dimension="x" chart:name="primary-x" chart:style-name="ch4">
            <chart:title svg:x="6.48cm" svg:y="11.503cm" chart:style-name="ch5">
              <text:p>Buffer size (log2(samples))</text:p>
            </chart:title>
            <chart:grid chart:style-name="ch6" chart:class="major"/>
          </chart:axis>
          <chart:axis chart:dimension="y" chart:name="primary-y" chart:style-name="ch7">
            <chart:title svg:x="0.451cm" svg:y="9.457cm" chart:style-name="ch8">
              <text:p>Throughput (log10(samples/seconds))</text:p>
            </chart:title>
            <chart:grid chart:style-name="ch6" chart:class="major"/>
          </chart:axis>
          <chart:series chart:style-name="ch9" chart:values-cell-range-address="Sheet1.D2:Sheet1.D18" chart:label-cell-address="Sheet1.D1:Sheet1.D1" chart:class="chart:scatter">
            <chart:domain table:cell-range-address="Sheet1.C2:Sheet1.C18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hroughpu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2:Sheet1.C18</svg:desc>
                </draw:g>
              </table:table-cell>
              <table:table-cell office:value-type="float" office:value="5.99344857574904">
                <text:p>5.99344857574904</text:p>
                <draw:g>
                  <svg:desc>Sheet1.D2:Sheet1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32111768608557">
                <text:p>6.321117686085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.62561799620569">
                <text:p>6.625617996205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.00524487944537">
                <text:p>7.005244879445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.34872143010456">
                <text:p>7.348721430104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.57839621210438">
                <text:p>7.578396212104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74472784233214">
                <text:p>7.744727842332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77469064878701">
                <text:p>7.774690648787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69036976308698">
                <text:p>7.690369763086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.72124657276493">
                <text:p>7.721246572764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7.71219833955689">
                <text:p>7.712198339556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7.53760252325411">
                <text:p>7.537602523254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7.57839621210438">
                <text:p>7.578396212104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7.65757688488309">
                <text:p>7.657576884883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7.64975239858834">
                <text:p>7.649752398588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7.63078370829516">
                <text:p>7.630783708295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7.59176003468815">
                <text:p>7.591760034688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