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vector</text:p>
          </table:table-cell>
          <table:table-cell office:value-type="string" calcext:value-type="string">
            <text:p>std::vector</text:p>
          </table:table-cell>
          <table:table-cell office:value-type="string" calcext:value-type="string">
            <text:p>uvector (Clang)</text:p>
          </table:table-cell>
          <table:table-cell/>
          <table:table-cell office:value-type="string" calcext:value-type="string">
            <text:p>Gcc 4.7.3</text:p>
          </table:table-cell>
          <table:table-cell office:value-type="string" calcext:value-type="string">
            <text:p>Clang 3.2-11</text:p>
          </table:table-cell>
          <table:table-cell table:number-columns-repeated="6"/>
        </table:table-row>
        <table:table-row table:style-name="ro1">
          <table:table-cell office:value-type="float" office:value="919.8" calcext:value-type="float">
            <text:p>919.8</text:p>
          </table:table-cell>
          <table:table-cell office:value-type="float" office:value="919.4" calcext:value-type="float">
            <text:p>919.4</text:p>
          </table:table-cell>
          <table:table-cell office:value-type="float" office:value="927.2" calcext:value-type="float">
            <text:p>927.2</text:p>
          </table:table-cell>
          <table:table-cell office:value-type="string" calcext:value-type="string">
            <text:p>smaller or equal than</text:p>
          </table:table-cell>
          <table:table-cell table:style-name="ce2" table:formula="of:=[.A2]/[.B2]" office:value-type="percentage" office:value="1.00043506634762" calcext:value-type="percentage">
            <text:p>100.04%</text:p>
          </table:table-cell>
          <table:table-cell table:style-name="ce2" table:formula="of:=[.C2]/[.B2]" office:value-type="percentage" office:value="1.00848379377855" calcext:value-type="percentage">
            <text:p>100.85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923.4" calcext:value-type="float">
            <text:p>923.4</text:p>
          </table:table-cell>
          <table:table-cell office:value-type="float" office:value="919.6" calcext:value-type="float">
            <text:p>919.6</text:p>
          </table:table-cell>
          <table:table-cell office:value-type="float" office:value="924.2" calcext:value-type="float">
            <text:p>924.2</text:p>
          </table:table-cell>
          <table:table-cell office:value-type="string" calcext:value-type="string">
            <text:p>smaller than</text:p>
          </table:table-cell>
          <table:table-cell table:style-name="ce2" table:formula="of:=[.A3]/[.B3]" office:value-type="percentage" office:value="1.00413223140496" calcext:value-type="percentage">
            <text:p>100.41%</text:p>
          </table:table-cell>
          <table:table-cell table:style-name="ce2" table:formula="of:=[.C3]/[.B3]" office:value-type="percentage" office:value="1.00500217485863" calcext:value-type="percentage">
            <text:p>100.50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1280.6" calcext:value-type="float">
            <text:p>1280.6</text:p>
          </table:table-cell>
          <table:table-cell office:value-type="float" office:value="1263.8" calcext:value-type="float">
            <text:p>1263.8</text:p>
          </table:table-cell>
          <table:table-cell office:value-type="float" office:value="1260.4" calcext:value-type="float">
            <text:p>1260.4</text:p>
          </table:table-cell>
          <table:table-cell office:value-type="string" calcext:value-type="string">
            <text:p>equality</text:p>
          </table:table-cell>
          <table:table-cell table:style-name="ce2" table:formula="of:=[.A4]/[.B4]" office:value-type="percentage" office:value="1.01329324260168" calcext:value-type="percentage">
            <text:p>101.33%</text:p>
          </table:table-cell>
          <table:table-cell table:style-name="ce2" table:formula="of:=[.C4]/[.B4]" office:value-type="percentage" office:value="0.997309700902041" calcext:value-type="percentage">
            <text:p>99.73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2184.4" calcext:value-type="float">
            <text:p>2184.4</text:p>
          </table:table-cell>
          <table:table-cell office:value-type="float" office:value="2178.8" calcext:value-type="float">
            <text:p>2178.8</text:p>
          </table:table-cell>
          <table:table-cell office:value-type="float" office:value="2190.4" calcext:value-type="float">
            <text:p>2190.4</text:p>
          </table:table-cell>
          <table:table-cell office:value-type="string" calcext:value-type="string">
            <text:p>iterate</text:p>
          </table:table-cell>
          <table:table-cell table:style-name="ce2" table:formula="of:=[.A5]/[.B5]" office:value-type="percentage" office:value="1.00257022214063" calcext:value-type="percentage">
            <text:p>100.26%</text:p>
          </table:table-cell>
          <table:table-cell table:style-name="ce2" table:formula="of:=[.C5]/[.B5]" office:value-type="percentage" office:value="1.00532403157701" calcext:value-type="percentage">
            <text:p>100.53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3397.6" calcext:value-type="float">
            <text:p>3397.6</text:p>
          </table:table-cell>
          <table:table-cell office:value-type="float" office:value="3453.6" calcext:value-type="float">
            <text:p>3453.6</text:p>
          </table:table-cell>
          <table:table-cell office:value-type="float" office:value="3412.6" calcext:value-type="float">
            <text:p>3412.6</text:p>
          </table:table-cell>
          <table:table-cell office:value-type="string" calcext:value-type="string">
            <text:p>erase</text:p>
          </table:table-cell>
          <table:table-cell table:style-name="ce2" table:formula="of:=[.A6]/[.B6]" office:value-type="percentage" office:value="0.983785035904563" calcext:value-type="percentage">
            <text:p>98.38%</text:p>
          </table:table-cell>
          <table:table-cell table:style-name="ce2" table:formula="of:=[.C6]/[.B6]" office:value-type="percentage" office:value="0.988128329858698" calcext:value-type="percentage">
            <text:p>98.81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6174.6" calcext:value-type="float">
            <text:p>6174.6</text:p>
          </table:table-cell>
          <table:table-cell office:value-type="float" office:value="5673" calcext:value-type="float">
            <text:p>5673</text:p>
          </table:table-cell>
          <table:table-cell office:value-type="string" calcext:value-type="string">
            <text:p>insert_uninitialized</text:p>
          </table:table-cell>
          <table:table-cell table:style-name="ce2" table:formula="of:=[.A7]/[.B7]" office:value-type="percentage" office:value="0.924918213325559" calcext:value-type="percentage">
            <text:p>92.49%</text:p>
          </table:table-cell>
          <table:table-cell table:style-name="ce2" table:formula="of:=[.C7]/[.B7]" office:value-type="percentage" office:value="0.918763968516179" calcext:value-type="percentage">
            <text:p>91.88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8553.4" calcext:value-type="float">
            <text:p>8553.4</text:p>
          </table:table-cell>
          <table:table-cell office:value-type="float" office:value="8802.8" calcext:value-type="float">
            <text:p>8802.8</text:p>
          </table:table-cell>
          <table:table-cell office:value-type="float" office:value="8327.2" calcext:value-type="float">
            <text:p>8327.2</text:p>
          </table:table-cell>
          <table:table-cell office:value-type="string" calcext:value-type="string">
            <text:p>insert</text:p>
          </table:table-cell>
          <table:table-cell table:style-name="ce2" table:formula="of:=[.A8]/[.B8]" office:value-type="percentage" office:value="0.971668105602763" calcext:value-type="percentage">
            <text:p>97.17%</text:p>
          </table:table-cell>
          <table:table-cell table:style-name="ce2" table:formula="of:=[.C8]/[.B8]" office:value-type="percentage" office:value="0.945971736265734" calcext:value-type="percentage">
            <text:p>94.60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1873.6" calcext:value-type="float">
            <text:p>1873.6</text:p>
          </table:table-cell>
          <table:table-cell office:value-type="float" office:value="4026.8" calcext:value-type="float">
            <text:p>4026.8</text:p>
          </table:table-cell>
          <table:table-cell office:value-type="float" office:value="1870.4" calcext:value-type="float">
            <text:p>1870.4</text:p>
          </table:table-cell>
          <table:table-cell office:value-type="string" calcext:value-type="string">
            <text:p>push_back_uninitialized</text:p>
          </table:table-cell>
          <table:table-cell table:style-name="ce2" table:formula="of:=[.A9]/[.B9]" office:value-type="percentage" office:value="0.465282606536207" calcext:value-type="percentage">
            <text:p>46.53%</text:p>
          </table:table-cell>
          <table:table-cell table:style-name="ce2" table:formula="of:=[.C9]/[.B9]" office:value-type="percentage" office:value="0.464487930863216" calcext:value-type="percentage">
            <text:p>46.45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3788.6" calcext:value-type="float">
            <text:p>3788.6</text:p>
          </table:table-cell>
          <table:table-cell office:value-type="float" office:value="4027.4" calcext:value-type="float">
            <text:p>4027.4</text:p>
          </table:table-cell>
          <table:table-cell office:value-type="float" office:value="6271.8" calcext:value-type="float">
            <text:p>6271.8</text:p>
          </table:table-cell>
          <table:table-cell office:value-type="string" calcext:value-type="string">
            <text:p>push_back size initialized</text:p>
          </table:table-cell>
          <table:table-cell table:style-name="ce2" table:formula="of:=[.A10]/[.B10]" office:value-type="percentage" office:value="0.940706162784923" calcext:value-type="percentage">
            <text:p>94.07%</text:p>
          </table:table-cell>
          <table:table-cell table:style-name="ce2" table:formula="of:=[.C10]/[.B10]" office:value-type="percentage" office:value="1.55728261409346" calcext:value-type="percentage">
            <text:p>155.73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6826.2" calcext:value-type="float">
            <text:p>6826.2</text:p>
          </table:table-cell>
          <table:table-cell office:value-type="float" office:value="3668.4" calcext:value-type="float">
            <text:p>3668.4</text:p>
          </table:table-cell>
          <table:table-cell office:value-type="string" calcext:value-type="string">
            <text:p>push_back</text:p>
          </table:table-cell>
          <table:table-cell table:style-name="ce2" table:formula="of:=[.A11]/[.B11]" office:value-type="percentage" office:value="0.623187131932847" calcext:value-type="percentage">
            <text:p>62.32%</text:p>
          </table:table-cell>
          <table:table-cell table:style-name="ce2" table:formula="of:=[.C11]/[.B11]" office:value-type="percentage" office:value="0.537400017579327" calcext:value-type="percentage">
            <text:p>53.74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804.6" calcext:value-type="float">
            <text:p>804.6</text:p>
          </table:table-cell>
          <table:table-cell office:value-type="float" office:value="912.4" calcext:value-type="float">
            <text:p>912.4</text:p>
          </table:table-cell>
          <table:table-cell office:value-type="float" office:value="783.6" calcext:value-type="float">
            <text:p>783.6</text:p>
          </table:table-cell>
          <table:table-cell office:value-type="string" calcext:value-type="string">
            <text:p>assign copy</text:p>
          </table:table-cell>
          <table:table-cell table:style-name="ce2" table:formula="of:=[.A12]/[.B12]" office:value-type="percentage" office:value="0.881850065760631" calcext:value-type="percentage">
            <text:p>88.19%</text:p>
          </table:table-cell>
          <table:table-cell table:style-name="ce2" table:formula="of:=[.C12]/[.B12]" office:value-type="percentage" office:value="0.85883384480491" calcext:value-type="percentage">
            <text:p>85.88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261.4" calcext:value-type="float">
            <text:p>1261.4</text:p>
          </table:table-cell>
          <table:table-cell office:value-type="float" office:value="1029.2" calcext:value-type="float">
            <text:p>1029.2</text:p>
          </table:table-cell>
          <table:table-cell office:value-type="string" calcext:value-type="string">
            <text:p>copy constructor</text:p>
          </table:table-cell>
          <table:table-cell table:style-name="ce2" table:formula="of:=[.A13]/[.B13]" office:value-type="percentage" office:value="0.810210876803552" calcext:value-type="percentage">
            <text:p>81.02%</text:p>
          </table:table-cell>
          <table:table-cell table:style-name="ce2" table:formula="of:=[.C13]/[.B13]" office:value-type="percentage" office:value="0.815918820358332" calcext:value-type="percentage">
            <text:p>81.59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07.6" calcext:value-type="float">
            <text:p>1407.6</text:p>
          </table:table-cell>
          <table:table-cell office:value-type="float" office:value="1195.2" calcext:value-type="float">
            <text:p>1195.2</text:p>
          </table:table-cell>
          <table:table-cell office:value-type="string" calcext:value-type="string">
            <text:p>constructor fill</text:p>
          </table:table-cell>
          <table:table-cell table:style-name="ce2" table:formula="of:=[.A14]/[.B14]" office:value-type="percentage" office:value="0.907928388746803" calcext:value-type="percentage">
            <text:p>90.79%</text:p>
          </table:table-cell>
          <table:table-cell table:style-name="ce2" table:formula="of:=[.C14]/[.B14]" office:value-type="percentage" office:value="0.849104859335038" calcext:value-type="percentage">
            <text:p>84.91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float" office:value="1042.8" calcext:value-type="float">
            <text:p>1042.8</text:p>
          </table:table-cell>
          <table:table-cell office:value-type="float" office:value="3484.6" calcext:value-type="float">
            <text:p>3484.6</text:p>
          </table:table-cell>
          <table:table-cell office:value-type="float" office:value="1040.2" calcext:value-type="float">
            <text:p>1040.2</text:p>
          </table:table-cell>
          <table:table-cell office:value-type="string" calcext:value-type="string">
            <text:p>constructor</text:p>
          </table:table-cell>
          <table:table-cell table:style-name="ce2" table:formula="of:=[.A15]/[.B15]" office:value-type="percentage" office:value="0.29925959938013" calcext:value-type="percentage">
            <text:p>29.93%</text:p>
          </table:table-cell>
          <table:table-cell table:style-name="ce2" table:formula="of:=[.C15]/[.B15]" office:value-type="percentage" office:value="0.298513459220571" calcext:value-type="percentage">
            <text:p>29.85%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verage</text:p>
          </table:table-cell>
          <table:table-cell table:style-name="ce3" table:formula="of:=AVERAGE([.E2:.E15])" office:value-type="percentage" office:value="0.844944782090919" calcext:value-type="percentage">
            <text:p>84.49%</text:p>
          </table:table-cell>
          <table:table-cell table:style-name="ce3" table:formula="of:=AVERAGE([.F2:.F15])" office:value-type="percentage" office:value="0.875037520143694" calcext:value-type="percentage">
            <text:p>87.50%</text:p>
          </table:table-cell>
          <table:table-cell table:number-columns-repeated="6"/>
        </table:table-row>
        <table:table-row table:style-name="ro1" table:number-rows-repeated="15">
          <table:table-cell table:number-columns-repeated="4"/>
          <table:table-cell table:style-name="ce2"/>
          <table:table-cell table:number-columns-repeated="7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7.0736in" svg:height="3.9217in" svg:x="0in" svg:y="0in">
            <draw:object draw:notify-on-update-of-ranges="Sheet1.D1:Sheet1.D1 Sheet1.D2:Sheet1.D16 Sheet1.E1:Sheet1.E1 Sheet1.E2:Sheet1.E16 Sheet1.F1:Sheet1.F1 Sheet1.F2:Sheet1.F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 table:number-rows-repeated="4">
          <table:table-cell/>
        </table:table-row>
        <table:table-row table:style-name="ro1" table:number-rows-repeated="2">
          <table:table-cell/>
        </table:table-row>
        <table:table-row table:style-name="ro2" table:number-rows-repeated="6">
          <table:table-cell/>
        </table:table-row>
        <table:table-row table:style-name="ro1" table:number-rows-repeated="3">
          <table:table-cell/>
        </table:table-row>
        <table:table-row table:style-name="ro2" table:number-rows-repeated="3">
          <table:table-cell/>
        </table:table-row>
        <table:table-row table:style-name="ro1" table:number-rows-repeated="4">
          <table:table-cell/>
        </table:table-row>
        <table:table-row table:style-name="ro2">
          <table:table-cell/>
        </table:table-row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6.2701in" style:num-format="1" style:print-orientation="landscape" fo:margin-top="0in" fo:margin-bottom="0in" fo:margin-left="0in" fo:margin-right="0in" style:shadow="none" fo:background-color="transparent" style:scale-to="16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0:00:03.71603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21:34:11.075745237</meta:creation-date>
    <dc:date>2013-09-30T15:53:37.483081856</dc:date>
    <meta:editing-duration>PT4H43M47S</meta:editing-duration>
    <meta:editing-cycles>5</meta:editing-cycles>
    <meta:generator>LibreOffice/4.1.1.2$Linux_X86_64 LibreOffice_project/410m0$Build-2</meta:generator>
    <meta:document-statistic meta:table-count="2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FreeSans" fo:font-size="13pt" style:font-size-asian="13pt" style:font-size-complex="13pt"/>
    </style:style>
    <style:style style:name="ch3" style:family="chart">
      <style:chart-properties chart:auto-position="true"/>
      <style:text-properties fo:font-family="FreeSans"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FreeSans" style:font-style-name="Regular"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family="FreeSans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family="FreeSans" style:font-style-name="Regular" fo:font-size="10pt" style:font-size-asian="10pt" style:font-size-complex="10pt"/>
    </style:style>
    <style:style style:name="ch10" style:family="chart" style:data-style-name="N11">
      <style:chart-properties chart:solid-type="cylinder"/>
      <style:graphic-properties draw:fill-color="#ff420e" draw:opacity-name="ChartTransparencyGradient_20_5"/>
      <style:text-properties fo:font-size="10pt" style:font-size-asian="10pt" style:font-size-complex="10pt"/>
    </style:style>
    <style:style style:name="ch11" style:family="chart">
      <style:chart-properties chart:solid-type="cylinder"/>
    </style:style>
    <style:style style:name="ch12" style:family="chart" style:data-style-name="N11">
      <style:chart-properties chart:solid-type="cylinder"/>
      <style:graphic-properties draw:fill-color="#0084d1" draw:opacity-name="ChartTransparencyGradient_20_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68cm" svg:height="9.962cm" xlink:href=".." xlink:type="simple" chart:class="chart:bar" chart:style-name="ch1">
        <chart:title svg:x="5.13cm" svg:y="0.335cm" chart:style-name="ch2">
          <text:p>Timing of uvector relative to std::vector</text:p>
        </chart:title>
        <chart:subtitle svg:x="1.717cm" svg:y="1.339cm" chart:style-name="ch3">
          <text:p>(&lt;100% means uvector is faster, timings are relative to std::vector compiled with gcc)</text:p>
        </chart:subtitle>
        <chart:legend svg:x="14.93cm" svg:y="0.401cm" style:legend-expansion="custom" chartooo:width="2.728cm" chartooo:height="0.992cm" style:legend-expansion-aspect-ratio="2.75" chart:style-name="ch4"/>
        <chart:plot-area chart:style-name="ch5" table:cell-range-address="Sheet1.D1:Sheet1.F16" chart:data-source-has-labels="both" svg:x="0.623cm" svg:y="2.064cm" svg:width="17.41cm" svg:height="7.5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603cm" svg:y="2.064cm" svg:width="12.968cm" svg:height="6.8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D2:Sheet1.D1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Sheet1.E2:Sheet1.E16" chart:label-cell-address="Sheet1.E1:Sheet1.E1" chart:class="chart:bar">
            <chart:data-point chart:repeated="9"/>
            <chart:data-point chart:style-name="ch11"/>
            <chart:data-point chart:repeated="5"/>
          </chart:series>
          <chart:series chart:style-name="ch12" chart:values-cell-range-address="Sheet1.F2:Sheet1.F16" chart:label-cell-address="Sheet1.F1:Sheet1.F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4.7.3</text:p>
                <draw:g>
                  <svg:desc>Sheet1.E1:Sheet1.E1</svg:desc>
                </draw:g>
              </table:table-cell>
              <table:table-cell office:value-type="string">
                <text:p>Clang 3.2-11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er or equal than</text:p>
                <draw:g>
                  <svg:desc>Sheet1.D2:Sheet1.D16</svg:desc>
                </draw:g>
              </table:table-cell>
              <table:table-cell office:value-type="float" office:value="1.00043506634762">
                <text:p>1.00043506634762</text:p>
                <draw:g>
                  <svg:desc>Sheet1.E2:Sheet1.E16</svg:desc>
                </draw:g>
              </table:table-cell>
              <table:table-cell office:value-type="float" office:value="1.00848379377855">
                <text:p>1.00848379377855</text:p>
                <draw:g>
                  <svg:desc>Sheet1.F2:Sheet1.F16</svg:desc>
                </draw:g>
              </table:table-cell>
            </table:table-row>
            <table:table-row>
              <table:table-cell office:value-type="string">
                <text:p>smaller than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1.00500217485863">
                <text:p>1.00500217485863</text:p>
              </table:table-cell>
            </table:table-row>
            <table:table-row>
              <table:table-cell office:value-type="string">
                <text:p>equality</text:p>
              </table:table-cell>
              <table:table-cell office:value-type="float" office:value="1.01329324260168">
                <text:p>1.01329324260168</text:p>
              </table:table-cell>
              <table:table-cell office:value-type="float" office:value="0.997309700902041">
                <text:p>0.997309700902041</text:p>
              </table:table-cell>
            </table:table-row>
            <table:table-row>
              <table:table-cell office:value-type="string">
                <text:p>iterate</text:p>
              </table:table-cell>
              <table:table-cell office:value-type="float" office:value="1.00257022214063">
                <text:p>1.00257022214063</text:p>
              </table:table-cell>
              <table:table-cell office:value-type="float" office:value="1.00532403157701">
                <text:p>1.00532403157701</text:p>
              </table:table-cell>
            </table:table-row>
            <table:table-row>
              <table:table-cell office:value-type="string">
                <text:p>erase</text:p>
              </table:table-cell>
              <table:table-cell office:value-type="float" office:value="0.983785035904563">
                <text:p>0.983785035904563</text:p>
              </table:table-cell>
              <table:table-cell office:value-type="float" office:value="0.988128329858698">
                <text:p>0.988128329858698</text:p>
              </table:table-cell>
            </table:table-row>
            <table:table-row>
              <table:table-cell office:value-type="string">
                <text:p>insert_uninitialized</text:p>
              </table:table-cell>
              <table:table-cell office:value-type="float" office:value="0.924918213325559">
                <text:p>0.924918213325559</text:p>
              </table:table-cell>
              <table:table-cell office:value-type="float" office:value="0.918763968516179">
                <text:p>0.918763968516179</text:p>
              </table:table-cell>
            </table:table-row>
            <table:table-row>
              <table:table-cell office:value-type="string">
                <text:p>insert</text:p>
              </table:table-cell>
              <table:table-cell office:value-type="float" office:value="0.971668105602763">
                <text:p>0.971668105602763</text:p>
              </table:table-cell>
              <table:table-cell office:value-type="float" office:value="0.945971736265734">
                <text:p>0.945971736265734</text:p>
              </table:table-cell>
            </table:table-row>
            <table:table-row>
              <table:table-cell office:value-type="string">
                <text:p>push_back_uninitialized</text:p>
              </table:table-cell>
              <table:table-cell office:value-type="float" office:value="0.465282606536207">
                <text:p>0.465282606536207</text:p>
              </table:table-cell>
              <table:table-cell office:value-type="float" office:value="0.464487930863216">
                <text:p>0.464487930863216</text:p>
              </table:table-cell>
            </table:table-row>
            <table:table-row>
              <table:table-cell office:value-type="string">
                <text:p>push_back size initialized</text:p>
              </table:table-cell>
              <table:table-cell office:value-type="float" office:value="0.940706162784923">
                <text:p>0.940706162784923</text:p>
              </table:table-cell>
              <table:table-cell office:value-type="float" office:value="1.55728261409346">
                <text:p>1.55728261409346</text:p>
              </table:table-cell>
            </table:table-row>
            <table:table-row>
              <table:table-cell office:value-type="string">
                <text:p>push_back</text:p>
              </table:table-cell>
              <table:table-cell office:value-type="float" office:value="0.623187131932847">
                <text:p>0.623187131932847</text:p>
              </table:table-cell>
              <table:table-cell office:value-type="float" office:value="0.537400017579327">
                <text:p>0.537400017579327</text:p>
              </table:table-cell>
            </table:table-row>
            <table:table-row>
              <table:table-cell office:value-type="string">
                <text:p>assign copy</text:p>
              </table:table-cell>
              <table:table-cell office:value-type="float" office:value="0.881850065760631">
                <text:p>0.881850065760631</text:p>
              </table:table-cell>
              <table:table-cell office:value-type="float" office:value="0.85883384480491">
                <text:p>0.85883384480491</text:p>
              </table:table-cell>
            </table:table-row>
            <table:table-row>
              <table:table-cell office:value-type="string">
                <text:p>copy constructor</text:p>
              </table:table-cell>
              <table:table-cell office:value-type="float" office:value="0.810210876803552">
                <text:p>0.810210876803552</text:p>
              </table:table-cell>
              <table:table-cell office:value-type="float" office:value="0.815918820358332">
                <text:p>0.815918820358332</text:p>
              </table:table-cell>
            </table:table-row>
            <table:table-row>
              <table:table-cell office:value-type="string">
                <text:p>constructor fill</text:p>
              </table:table-cell>
              <table:table-cell office:value-type="float" office:value="0.907928388746803">
                <text:p>0.907928388746803</text:p>
              </table:table-cell>
              <table:table-cell office:value-type="float" office:value="0.849104859335038">
                <text:p>0.849104859335038</text:p>
              </table:table-cell>
            </table:table-row>
            <table:table-row>
              <table:table-cell office:value-type="string">
                <text:p>constructor</text:p>
              </table:table-cell>
              <table:table-cell office:value-type="float" office:value="0.29925959938013">
                <text:p>0.29925959938013</text:p>
              </table:table-cell>
              <table:table-cell office:value-type="float" office:value="0.298513459220571">
                <text:p>0.29851345922057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44944782090919">
                <text:p>0.844944782090919</text:p>
              </table:table-cell>
              <table:table-cell office:value-type="float" office:value="0.875037520143694">
                <text:p>0.875037520143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rectangular" draw:cx="50%" draw:cy="50%" draw:start="100%" draw:end="0%" draw:angle="0" draw:border="0%"/>
    <draw:opacity draw:name="ChartTransparencyGradient_20_6" draw:display-name="ChartTransparencyGradient 6" draw:style="square" draw:cx="50%" draw:cy="50%" draw:start="100%" draw:end="0%" draw:angle="0" draw:border="0%"/>
  </office:styles>
</office:document-styles>
</file>